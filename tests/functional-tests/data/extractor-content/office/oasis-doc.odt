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Linux Biolinum O" svg:font-family="'Linux Biolinum O'" style:font-family-generic="swiss" style:font-pitch="variable"/>
    <style:font-face style:name="Linux Libertine O" svg:font-family="'Linux Libertine O'"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officeooo:paragraph-rsid="001f19a0"/>
    </style:style>
    <style:style style:name="P2" style:family="paragraph" style:parent-style-name="Text_20_body">
      <style:paragraph-properties fo:text-align="justify" style:justify-single-word="false" fo:break-before="page" style:writing-mode="lr-tb" style:writing-mode-automatic="false"/>
      <style:text-properties fo:language="en" fo:country="US" officeooo:paragraph-rsid="001f9ce2"/>
    </style:style>
    <style:style style:name="P3" style:family="paragraph" style:parent-style-name="Text_20_body">
      <style:paragraph-properties fo:text-align="justify" style:justify-single-word="false" style:writing-mode="lr-tb" style:writing-mode-automatic="false"/>
      <style:text-properties fo:language="en" fo:country="US" officeooo:paragraph-rsid="001f9ce2"/>
    </style:style>
    <style:style style:name="T1" style:family="text">
      <style:text-properties officeooo:rsid="001e2aa9"/>
    </style:style>
    <style:style style:name="T2" style:family="text">
      <style:text-properties officeooo:rsid="001d5fe4"/>
    </style:style>
    <style:style style:name="T3" style:family="text">
      <style:text-properties officeooo:rsid="001f9c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wonderful serenity has taken possession of my entire soul, like these sweet mornings of spring which I enjoy with my whole</text:p>
      <text:p text:style-name="P2">he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 am alone, and feel the charm of existence in this spot, which was created for the bliss of souls like <text:span text:style-name="T1">Wandabuz</text:span>. I am so happy, my dear friend, so absorb<text:span text:style-name="T1">is</text:span><text:soft-page-break/><text:span text:style-name="T1">simmo</text:span> in the exquisite sense of mere tranquil existence, that I neglect my talents. I should be incapable of drawing a single stroke at the present moment; and yet I feel that I never was a greater artist than now. When, while the lovely valley teems with vapour around me, and the meridian sun strikes the upper surface of the impenetrable foliage of my trees, and but a few stray gleams steal into the inner sanctuary, I throw myself down among the tall grass by the trickling stream; and, as I lie close to the earth, a thousand unknown plants are noticed by me: when I hear the buzz of the little world among the stalks, and grow familiar with the countless indescribable forms of the insect<text:span text:style-name="T2">odoits</text:span> and flies, then I feel the presence of the <text:span text:style-name="T3">Al Bundy</text:span>, who formed us in his own image, and the bre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Linux Biolinum O" svg:font-family="'Linux Biolinum O'" style:font-family-generic="swiss" style:font-pitch="variable"/>
    <style:font-face style:name="Linux Libertine O" svg:font-family="'Linux Libertine O'"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nux Libertine O"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nux Libertine O"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nux Biolinum O" fo:font-family="'Linux Biolinum O'"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name="Linux Libertine O" fo:font-family="'Linux Libertine O'" style:font-family-generic="swiss" style:font-pitch="variable" style:font-size-asian="12pt" style:font-name-complex="FreeSans" style:font-family-complex="FreeSan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O" fo:font-family="'Linux Libertine O'" style:font-family-generic="swiss" style:font-pitch="variable" fo:font-size="12pt" fo:font-style="italic" style:font-size-asian="12pt" style:font-style-asian="italic" style:font-name-complex="FreeSans" style:font-family-complex="Free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family-generic="swiss" style:font-pitch="variable" style:font-size-asian="12pt" style:font-name-complex="FreeSans" style:font-family-complex="FreeSans" style:font-family-generic-complex="swiss"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5-23T19:20:16.211562799</meta:creation-date>
    <meta:editing-duration>PT7M15S</meta:editing-duration>
    <meta:editing-cycles>4</meta:editing-cycles>
    <meta:generator>LibreOffice/26.2.4.2$Linux_X86_64 LibreOffice_project/0229ac93fcf0d7cbc6376066c6f35021cef002dc</meta:generator>
    <dc:date>2026-07-12T14:56:31.529994935</dc:date>
    <dc:creator>first last</dc:creator>
    <meta:document-statistic meta:table-count="0" meta:image-count="0" meta:object-count="0" meta:page-count="3" meta:paragraph-count="3" meta:word-count="201" meta:character-count="1088" meta:non-whitespace-character-count="890"/>
  </office:meta>
</office:document-meta>
</file>